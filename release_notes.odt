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 Rounded MT Bold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 Rounded MT Bold"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VM12KP Inverter WiFi Adapter</text:p>
      <text:p text:style-name="P2">Version 1.0.1</text:p>
      <text:p text:style-name="P1"/>
      <text:p text:style-name="P3">This is the latest version. <text:s/>Good Luck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e Prue</meta:initial-creator>
    <meta:creation-date>2026-07-05T09:00:38.49</meta:creation-date>
    <meta:document-statistic meta:table-count="0" meta:image-count="0" meta:object-count="0" meta:page-count="1" meta:paragraph-count="3" meta:word-count="13" meta:character-count="81"/>
    <dc:date>2026-07-05T09:05:24.78</dc:date>
    <dc:creator>Dave Prue</dc:creator>
    <meta:editing-duration>PT4M47S</meta:editing-duration>
    <meta:editing-cycles>1</meta:editing-cycles>
    <meta:generator>OpenOffice/4.1.16$Win32 OpenOffice.org_project/4116m3$Build-9816</meta:generator>
  </office:meta>
</office:document-meta>
</file>